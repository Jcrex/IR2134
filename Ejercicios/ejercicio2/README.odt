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img1.png" manifest:media-type="image/png"/>
  <manifest:file-entry manifest:full-path="Pictures/img2.png" manifest:media-type="image/png"/>
  <manifest:file-entry manifest:full-path="Pictures/img3.png" manifest:media-type="image/png"/>
  <manifest:file-entry manifest:full-path="Pictures/img4.png" manifest:media-type="image/png"/>
  <manifest:file-entry manifest:full-path="Pictures/img5.png" manifest:media-type="image/png"/>
  <manifest:file-entry manifest:full-path="Pictures/img6.png" manifest:media-type="image/png"/>
  <manifest:file-entry manifest:full-path="Pictures/img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xmlns:table="urn:oasis:names:tc:opendocument:xmlns:table:1.0" office:version="1.2">
  <office:automatic-styles>
    <style:style style:name="H1" style:family="paragraph" style:parent-style-name="Standard" style:next-style-name="Body">
      <style:paragraph-properties fo:margin-top="0.5cm" fo:margin-bottom="0.2cm" fo:keep-with-next="always"/>
      <style:text-properties fo:font-size="18pt" fo:font-weight="bold" fo:color="#1a5276" style:font-name="Liberation Sans"/>
    </style:style>
    <style:style style:name="H2" style:family="paragraph" style:parent-style-name="Standard" style:next-style-name="Body">
      <style:paragraph-properties fo:margin-top="0.35cm" fo:margin-bottom="0.15cm" fo:keep-with-next="always"/>
      <style:text-properties fo:font-size="14pt" fo:font-weight="bold" fo:color="#21618c" style:font-name="Liberation Sans"/>
    </style:style>
    <style:style style:name="Body" style:family="paragraph" style:parent-style-name="Standard">
      <style:paragraph-properties fo:margin-bottom="0.15cm" fo:line-height="115%" fo:text-align="justify"/>
      <style:text-properties fo:font-size="11pt" style:font-name="Liberation Sans"/>
    </style:style>
    <style:style style:name="Code" style:family="paragraph" style:parent-style-name="Standard">
      <style:paragraph-properties fo:background-color="#f2f2f2" fo:padding="0.05cm" fo:margin-top="0cm" fo:margin-bottom="0cm" fo:border="0.01cm solid #d0d0d0"/>
      <style:text-properties fo:font-size="9.5pt" style:font-name="Roboto Mono" fo:font-family="'Roboto Mono'" fo:color="#222222"/>
    </style:style>
    <style:style style:name="Figure" style:family="paragraph" style:parent-style-name="Standard">
      <style:paragraph-properties fo:text-align="center" fo:margin-top="0.25cm" fo:margin-bottom="0.05cm"/>
    </style:style>
    <style:style style:name="Caption" style:family="paragraph" style:parent-style-name="Standard">
      <style:paragraph-properties fo:text-align="center" fo:margin-bottom="0.3cm"/>
      <style:text-properties fo:font-size="9pt" fo:font-style="italic" fo:color="#666666" style:font-name="Liberation Sans"/>
    </style:style>
    <style:style style:name="Img" style:family="graphic">
      <style:graphic-properties style:vertical-pos="top" style:horizontal-pos="center" fo:border="0.01cm solid #cccccc"/>
    </style:style>
  </office:automatic-styles>
  <office:body>
    <office:text>
      <text:p text:style-name="Body">En este documento declaro todos los comandos e instrucciones necesarios para poder lanzar y trabajar en Open-RMF con la simulación de la Escola d'Enginyeria Tècnica Industrial de la Universitat Politècnica de Catalunya (UPC).</text:p>
      <text:h text:style-name="H1" text:outline-level="1">Creación del world</text:h>
      <text:p text:style-name="Body">Primero tuve que levantar el contenedor de docker para trabajar en Open-RMF:</text:p>
      <text:p text:style-name="Code">rocker --nvidia --x11 --name rmf_library \</text:p>
      <text:p text:style-name="Code">-e ROS_AUTOMATIC_DISCOVERY_RANGE=LOCALHOST \</text:p>
      <text:p text:style-name="Code">--network host --user --volume `pwd`/exercise_ws:/exercise_ws --\</text:p>
      <text:p text:style-name="Code">ghcr.io/open-rmf/rmf/rmf_demos:jazzy-rmf-latest bash</text:p>
      <text:p text:style-name="Body">Luego, dentro del contenedor, lancé el comando traffic-editor para abrir la aplicación y dibujar la planta baja (baixa) del edificio: paredes, puertas, los carriles de navegación, los waypoints de interés y los puntos de spawn de los robots:</text:p>
      <text:p text:style-name="Body">local-1 … local-7: ubicaciones de interés por las que los robots pueden patrullar.</text:p>
      <text:p text:style-name="Body">tinyRobot_charger1: punto de estacionamiento y recarga del robot 1.</text:p>
      <text:p text:style-name="Body">tinyRobot_charger2: punto de estacionamiento y recarga del robot 2.</text:p>
      <text:p text:style-name="Figure"><draw:frame draw:style-name="Img" text:anchor-type="as-char" svg:width="16.5cm" svg:height="9.281cm" draw:z-index="0"><draw:image xlink:href="Pictures/img1.png" xlink:type="simple" xlink:show="embed" xlink:actuate="onLoad"/></draw:frame></text:p>
      <text:p text:style-name="Caption">Planta baixa del edificio Industrial UPC editada en traffic-editor.</text:p>
      <text:h text:style-name="H2" text:outline-level="2">Compilación del world</text:h>
      <text:p text:style-name="Body">Para poder concretar el mundo, se requiere construirlo, y para ello se lanzaron los siguientes comandos para compilarlo:</text:p>
      <text:p text:style-name="Code">ros2 run rmf_building_map_tools building_map_generator gazebo \</text:p>
      <text:p text:style-name="Code"><text:s text:c="2"/>industrial.building.yaml industrial.world industrial_world</text:p>
      <text:p text:style-name="Code"/>
      <text:p text:style-name="Code">ros2 run rmf_building_map_tools building_map_generator nav \</text:p>
      <text:p text:style-name="Code"><text:s text:c="2"/>industrial.building.yaml nav_graphs</text:p>
      <text:p text:style-name="Body">Ahora debemos confirmar que se ha creado correctamente, por lo cual se ejecutó lo siguiente:</text:p>
      <text:p text:style-name="Code">ros2 run rmf_building_map_tools building_map_model_downloader industrial.building.yaml -e ./models</text:p>
      <text:p text:style-name="Code">export GZ_SIM_RESOURCE_PATH=`pwd`/industrial_world:`pwd`/models:/rmf_demos_ws/install/rmf_demos_assets/share/rmf_demos_assets/models</text:p>
      <text:p text:style-name="Code">gz sim -r -v 4 industrial.world</text:p>
      <text:h text:style-name="H1" text:outline-level="1">Desarrollo de la simulación</text:h>
      <text:p text:style-name="Body">Ahora que ya está construido el mundo, tocó preparar el workspace para poder ejecutar la simulación. Reutilizando la estructura del ejercicio anterior, se creó un conjunto de paquetes paralelo (industrial_upc) reaprovechando los modelos de robots de psychology_uv_assets, lo que generó el siguiente árbol:</text:p>
      <text:p text:style-name="Code">tree src/industrial_upc/</text:p>
      <text:p text:style-name="Code">.</text:p>
      <text:p text:style-name="Code">├── industrial_upc_config</text:p>
      <text:p text:style-name="Code">│   ├── CMakeLists.txt</text:p>
      <text:p text:style-name="Code">│   ├── config</text:p>
      <text:p text:style-name="Code">│   │   └── industrial_upc_sim</text:p>
      <text:p text:style-name="Code">│   │       ├── cleanRobot_config.yaml</text:p>
      <text:p text:style-name="Code">│   │       ├── deliveryRobot_config.yaml</text:p>
      <text:p text:style-name="Code">│   │       └── tinyRobot_config.yaml</text:p>
      <text:p text:style-name="Code">│   ├── include</text:p>
      <text:p text:style-name="Code">│   │   └── industrial_upc_config</text:p>
      <text:p text:style-name="Code">│   │       └── industrial_upc.rviz</text:p>
      <text:p text:style-name="Code">│   ├── launch</text:p>
      <text:p text:style-name="Code">│   │   ├── common.launch.xml</text:p>
      <text:p text:style-name="Code">│   │   └── industrial_upc_sim.launch.xml</text:p>
      <text:p text:style-name="Code">│   ├── LICENSE</text:p>
      <text:p text:style-name="Code">│   └── package.xml</text:p>
      <text:p text:style-name="Code">├── industrial_upc_fleet_adapter</text:p>
      <text:p text:style-name="Code">│   ├── CHANGELOG.rst</text:p>
      <text:p text:style-name="Code">│   ├── config.yaml</text:p>
      <text:p text:style-name="Code">│   ├── industrial_upc_fleet_adapter</text:p>
      <text:p text:style-name="Code">│   │   ├── fleet_adapter.py</text:p>
      <text:p text:style-name="Code">│   │   ├── fleet_manager.py</text:p>
      <text:p text:style-name="Code">│   │   ├── __init__.py</text:p>
      <text:p text:style-name="Code">│   │   ├── manage_lane.py</text:p>
      <text:p text:style-name="Code">│   │   └── RobotClientAPI.py</text:p>
      <text:p text:style-name="Code">│   ├── launch</text:p>
      <text:p text:style-name="Code">│   │   └── fleet_adapter.launch.xml</text:p>
      <text:p text:style-name="Code">│   ├── package.xml</text:p>
      <text:p text:style-name="Code">│   ├── README.md</text:p>
      <text:p text:style-name="Code">│   ├── resource</text:p>
      <text:p text:style-name="Code">│   │   └── industrial_upc_fleet_adapter</text:p>
      <text:p text:style-name="Code">│   ├── setup.cfg</text:p>
      <text:p text:style-name="Code">│   ├── setup.py</text:p>
      <text:p text:style-name="Code">│   └── test</text:p>
      <text:p text:style-name="Code">│       ├── __init__.py</text:p>
      <text:p text:style-name="Code">│       ├── test_copyright.py</text:p>
      <text:p text:style-name="Code">│       ├── test_flake8.py</text:p>
      <text:p text:style-name="Code">│       └── test_pep257.py</text:p>
      <text:p text:style-name="Code">├── industrial_upc_maps</text:p>
      <text:p text:style-name="Code">│   ├── CMakeLists.txt</text:p>
      <text:p text:style-name="Code">│   ├── LICENSE</text:p>
      <text:p text:style-name="Code">│   ├── maps</text:p>
      <text:p text:style-name="Code">│   │   └── industrial</text:p>
      <text:p text:style-name="Code">│   │       ├── industrial.building.yaml</text:p>
      <text:p text:style-name="Code">│   │       ├── industrial.world</text:p>
      <text:p text:style-name="Code">│   │       ├── industrial_world</text:p>
      <text:p text:style-name="Code">│   │       │   └── industrial_baixa</text:p>
      <text:p text:style-name="Code">│   │       │       ├── meshes</text:p>
      <text:p text:style-name="Code">│   │       │       │   ├── blue_linoleum.png</text:p>
      <text:p text:style-name="Code">│   │       │       │   ├── default.png</text:p>
      <text:p text:style-name="Code">│   │       │       │   ├── floor_1.mtl</text:p>
      <text:p text:style-name="Code">│   │       │       │   ├── floor_1.obj</text:p>
      <text:p text:style-name="Code">│   │       │       │   ├── model.material</text:p>
      <text:p text:style-name="Code">│   │       │       │   ├── wall_1.mtl</text:p>
      <text:p text:style-name="Code">│   │       │       │   └── wall_1.obj</text:p>
      <text:p text:style-name="Code">│   │       │       ├── model.config</text:p>
      <text:p text:style-name="Code">│   │       │       └── model.sdf</text:p>
      <text:p text:style-name="Code">│   │       ├── nav_graphs</text:p>
      <text:p text:style-name="Code">│   │       │   └── 0.yaml</text:p>
      <text:p text:style-name="Code">│   │       ├── Plànols-20260426</text:p>
      <text:p text:style-name="Code">│   │       │   ├── planta_baixa.png</text:p>
      <text:p text:style-name="Code">│   │       │   ├── planta_soterrani_1.png</text:p>
      <text:p text:style-name="Code">│   │       │   └── planta_soterrani_2.png</text:p>
      <text:p text:style-name="Code">│   │       └── README.md</text:p>
      <text:p text:style-name="Code">│   └── package.xml</text:p>
      <text:p text:style-name="Code">└── industrial_upc_simulation</text:p>
      <text:p text:style-name="Code"><text:s text:c="4"/>├── CMakeLists.txt</text:p>
      <text:p text:style-name="Code"><text:s text:c="4"/>├── launch</text:p>
      <text:p text:style-name="Code"><text:s text:c="4"/>│   ├── industrial_upc_sim.launch.xml</text:p>
      <text:p text:style-name="Code"><text:s text:c="4"/>│   └── simulation.launch.xml</text:p>
      <text:p text:style-name="Code"><text:s text:c="4"/>└── package.xml</text:p>
      <text:p text:style-name="Body">Luego tocó compilar el workspace:</text:p>
      <text:p text:style-name="Code">cd /exercise_ws</text:p>
      <text:p text:style-name="Code">colcon build --symlink-install</text:p>
      <text:p text:style-name="Code">source install/setup.bash</text:p>
      <text:h text:style-name="H1" text:outline-level="1">Ejecutar simulación</text:h>
      <text:p text:style-name="Body">Luego de toda la configuración del simulador, tocó lanzarlo. Se usan varias terminales: la simulación, el servidor de la API y el dashboard web de Open-RMF:</text:p>
      <text:p text:style-name="Code"># Terminal 1</text:p>
      <text:p text:style-name="Code">ros2 launch industrial_upc_simulation industrial_upc_sim.launch.xml server_uri:="ws://localhost:8000/_internal"</text:p>
      <text:p text:style-name="Code"># Terminal 2</text:p>
      <text:p text:style-name="Code">docker run --network host --rm -it \</text:p>
      <text:p text:style-name="Code">-e ROS_AUTOMATIC_DISCOVERY_RANGE=LOCALHOST \</text:p>
      <text:p text:style-name="Code">-e RMW_IMPLEMENTATION=rmw_cyclonedds_cpp \</text:p>
      <text:p text:style-name="Code"><text:tab/>ghcr.io/open-rmf/rmf-web/api-server:jazzy-nightly</text:p>
      <text:p text:style-name="Code"># Terminal 3</text:p>
      <text:p text:style-name="Code">docker run \</text:p>
      <text:p text:style-name="Code">--network host -it --rm \</text:p>
      <text:p text:style-name="Code">-e RMF_SERVER_URL=http://localhost:8000 \</text:p>
      <text:p text:style-name="Code">-e TRAJECTORY_SERVER_URL=ws://localhost:8006 \</text:p>
      <text:p text:style-name="Code">ghcr.io/open-rmf/rmf-web/demo-dashboard:latest</text:p>
      <text:p text:style-name="Body">Con la simulación corriendo, en rviz y Gazebo se ven la planta y los dos tinyRobots en sus puntos de carga (tinyRobot_charger1 y tinyRobot_charger2):</text:p>
      <text:p text:style-name="Figure"><draw:frame draw:style-name="Img" text:anchor-type="as-char" svg:width="16.5cm" svg:height="9.281cm" draw:z-index="0"><draw:image xlink:href="Pictures/img2.png" xlink:type="simple" xlink:show="embed" xlink:actuate="onLoad"/></draw:frame></text:p>
      <text:p text:style-name="Caption">Simulación en marcha: rviz (izquierda) y Gazebo Sim (derecha) con la planta baixa y los tinyRobots.</text:p>
      <text:p text:style-name="Body">El dashboard web de Open-RMF muestra el estado de la flota en la pestaña ROBOTS: ambos robots de la flota tinyRobot, en el nivel baixa y con batería al 100%, además del estado de las puertas del edificio:</text:p>
      <text:p text:style-name="Figure"><draw:frame draw:style-name="Img" text:anchor-type="as-char" svg:width="16.5cm" svg:height="9.281cm" draw:z-index="0"><draw:image xlink:href="Pictures/img3.png" xlink:type="simple" xlink:show="embed" xlink:actuate="onLoad"/></draw:frame></text:p>
      <text:p text:style-name="Caption">Dashboard Open-RMF, pestaña ROBOTS: flota tinyRobot y puertas de la planta.</text:p>
      <text:h text:style-name="H2" text:outline-level="2">Lanzar tareas</text:h>
      <text:p text:style-name="Body">Las tareas se pueden lanzar por terminal o desde el propio dashboard. Por terminal, con patrullas (siempre con --use_sim_time en simulación):</text:p>
      <text:p text:style-name="Code">ros2 run rmf_demos_tasks dispatch_patrol -p local-1 local-7 -n 1 --use_sim_time</text:p>
      <text:p text:style-name="Code">ros2 run rmf_demos_tasks dispatch_patrol -F tinyRobot -R tinyRobot1 -p local-7 -n 1 --use_sim_time</text:p>
      <text:p text:style-name="Body">Desde el dashboard, con el botón NEW TASK, se crea una patrulla. Se puede asignar a un robot concreto (Dispatch Type: Robot) eligiendo el destino y el número de vueltas:</text:p>
      <text:p text:style-name="Figure"><draw:frame draw:style-name="Img" text:anchor-type="as-char" svg:width="12cm" svg:height="8.17cm" draw:z-index="0"><draw:image xlink:href="Pictures/img4.png" xlink:type="simple" xlink:show="embed" xlink:actuate="onLoad"/></draw:frame></text:p>
      <text:p text:style-name="Caption">Creación de una patrulla asignada a tinyRobot1 hacia el waypoint local-7.</text:p>
      <text:p text:style-name="Body">O dejar que RMF asigne automáticamente el robot libre más adecuado (Dispatch Type: Automatic):</text:p>
      <text:p text:style-name="Figure"><draw:frame draw:style-name="Img" text:anchor-type="as-char" svg:width="12cm" svg:height="8.371cm" draw:z-index="0"><draw:image xlink:href="Pictures/img5.png" xlink:type="simple" xlink:show="embed" xlink:actuate="onLoad"/></draw:frame></text:p>
      <text:p text:style-name="Caption">Creación de una patrulla con asignación automática hacia el waypoint local-4.</text:p>
      <text:p text:style-name="Body">Una vez enviadas, las tareas aparecen en la pestaña TASKS con su estado (queued, underway, completed) y la ruta se dibuja sobre el mapa:</text:p>
      <text:p text:style-name="Figure"><draw:frame draw:style-name="Img" text:anchor-type="as-char" svg:width="16.5cm" svg:height="9.281cm" draw:z-index="0"><draw:image xlink:href="Pictures/img6.png" xlink:type="simple" xlink:show="embed" xlink:actuate="onLoad"/></draw:frame></text:p>
      <text:p text:style-name="Caption">Pestaña TASKS: tareas encoladas y en curso con la ruta resaltada en el mapa.</text:p>
      <text:p text:style-name="Figure"><draw:frame draw:style-name="Img" text:anchor-type="as-char" svg:width="16.5cm" svg:height="9.281cm" draw:z-index="0"><draw:image xlink:href="Pictures/img7.png" xlink:type="simple" xlink:show="embed" xlink:actuate="onLoad"/></draw:frame></text:p>
      <text:p text:style-name="Caption">Tarea de patrulla en ejecución; el recorrido del robot se muestra en verde sobre el plano.</text:p>
      <text:h text:style-name="H1" text:outline-level="1">Problemas encontrados</text:h>
      <text:p text:style-name="Body">Durante la puesta en marcha aparecieron un par de incidencias que conviene documentar:</text:p>
      <text:p text:style-name="Body">1) Los robots se generaban en Gazebo pero no entraban en la flota (no salían en /fleet_states ni se movían). El adapter repetía «Cannot find a waypoint named [tinyRobot1_charger] in the navigation graph». La causa era un desajuste de nombres: en el mapa los puntos de carga se llamaban tinyRobot_charger1/2, pero el config de la flota pedía tinyRobot1_charger. RMF busca el waypoint por nombre exacto. Se solucionó alineando el config con los nombres reales del nav graph.</text:p>
      <text:p text:style-name="Body">2) El servidor de la API caía al arrancar con un error de validación de DoorState («Application startup failed»). El api server persiste el estado en una base de datos SQLite y un registro antiguo e incompleto de una puerta impedía cargarla. Se solucionó reseteando la base de datos (run/db.sqlite3), que se recrea vacía, y nombrando correctamente todas las puertas en traffic-editor para que no se guarden estados invál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xmlns:table="urn:oasis:names:tc:opendocument:xmlns:table:1.0" office:version="1.2">
  <office:font-face-decls>
    <style:font-face style:name="Liberation Sans" svg:font-family="'Liberation Sans'" style:font-family-generic="swiss"/>
    <style:font-face style:name="Roboto Mono" svg:font-family="'Roboto Mono'" style:font-family-generic="modern" style:font-pitch="fixed"/>
  </office:font-face-decls>
  <office:styles>
    <style:style style:name="Standard" style:family="paragraph" style:class="text"/>
  </office:styles>
  <office:master-styles>
    <style:master-page style:name="Standard" style:page-layout-name="PL"/>
  </office:master-styles>
  <office:automatic-styles>
    <style:page-layout style:name="PL">
      <style:page-layout-properties fo:page-width="21cm" fo:page-height="29.7cm" style:print-orientation="portrait" fo:margin-top="2cm" fo:margin-bottom="2cm" fo:margin-left="2cm" fo:margin-right="2cm"/>
    </style:page-layout>
  </office:automatic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README - Ejercicio 2 - Industrial UPC (Open-RMF)</dc:title>
    <meta:generator>manual</meta:generator>
  </office:meta>
</office:document-meta>
</file>